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font-name="Liberation Mono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Text_20_body">
      <style:text-properties style:font-name="Liberation Mono" fo:font-size="15pt" fo:font-style="normal" fo:font-weight="normal" officeooo:rsid="00246d5b" officeooo:paragraph-rsid="00246d5b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Text_20_body">
      <style:text-properties style:font-name="Liberation Mono" fo:font-size="15pt" fo:font-style="normal" fo:font-weight="normal" officeooo:rsid="0026255f" officeooo:paragraph-rsid="0026255f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Text_20_body" style:list-style-name="L1">
      <style:text-properties style:font-name="Liberation Mono"/>
    </style:style>
    <style:style style:name="P5" style:family="paragraph" style:parent-style-name="Heading_20_2">
      <style:paragraph-properties fo:margin-left="0in" fo:margin-right="0in" fo:text-indent="0in" style:auto-text-indent="false"/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P6" style:family="paragraph" style:parent-style-name="Text_20_body" style:list-style-name="L2">
      <style:text-properties style:font-name="Liberation Mono"/>
    </style:style>
    <style:style style:name="P7" style:family="paragraph" style:parent-style-name="Text_20_body" style:list-style-name="L3">
      <style:text-properties style:font-name="Liberation Mono"/>
    </style:style>
    <style:style style:name="P8" style:family="paragraph" style:parent-style-name="Text_20_body" style:list-style-name="L4">
      <style:text-properties style:font-name="Liberation Mono"/>
    </style:style>
    <style:style style:name="P9" style:family="paragraph" style:parent-style-name="Text_20_body" style:list-style-name="L5">
      <style:text-properties style:font-name="Liberation Mono"/>
    </style:style>
    <style:style style:name="P10" style:family="paragraph" style:parent-style-name="Standard">
      <style:text-properties style:font-name="Liberation Mono"/>
    </style:style>
    <style:style style:name="P11" style:family="paragraph" style:parent-style-name="Heading_20_2">
      <style:text-properties style:font-name="Liberation Mono"/>
    </style:style>
    <style:style style:name="P12" style:family="paragraph" style:parent-style-name="Text_20_body">
      <style:text-properties style:font-name="Liberation Mono"/>
    </style:style>
    <style:style style:name="P13" style:family="paragraph" style:parent-style-name="Text_20_body" style:list-style-name="L6"/>
    <style:style style:name="P14" style:family="paragraph" style:parent-style-name="Heading_20_2">
      <style:paragraph-properties fo:margin-left="0in" fo:margin-right="0in" fo:text-indent="0in" style:auto-text-indent="false"/>
      <style:text-properties style:font-name="Liberation Mono"/>
    </style:style>
    <style:style style:name="P15" style:family="paragraph" style:parent-style-name="Text_20_body" style:list-style-name="L7">
      <style:text-properties style:font-name="Liberation Mono"/>
    </style:style>
    <style:style style:name="P16" style:family="paragraph" style:parent-style-name="Text_20_body" style:list-style-name="L7"/>
    <style:style style:name="P17" style:family="paragraph" style:parent-style-name="Text_20_body">
      <style:paragraph-properties fo:margin-left="0in" fo:margin-right="0in" fo:text-indent="0in" style:auto-text-indent="false"/>
      <style:text-properties style:font-name="Liberation Mono"/>
    </style:style>
    <style:style style:name="P18" style:family="paragraph" style:parent-style-name="Text_20_body" style:list-style-name="L8"/>
    <style:style style:name="P19" style:family="paragraph" style:parent-style-name="Text_20_body" style:list-style-name="L9">
      <style:text-properties style:font-name="Liberation Mono"/>
    </style:style>
    <style:style style:name="P20" style:family="paragraph" style:parent-style-name="Text_20_body" style:list-style-name="L9"/>
    <style:style style:name="P21" style:family="paragraph" style:parent-style-name="Standard">
      <style:text-properties style:font-name="Liberation Mono" officeooo:rsid="0022c51a" officeooo:paragraph-rsid="0022c51a"/>
    </style:style>
    <style:style style:name="P22" style:family="paragraph" style:parent-style-name="Heading_20_2">
      <style:text-properties style:font-name="Liberation Mono" officeooo:rsid="0022c51a" officeooo:paragraph-rsid="0022c51a"/>
    </style:style>
    <style:style style:name="P23" style:family="paragraph" style:parent-style-name="Text_20_body">
      <style:text-properties style:font-name="Liberation Mono" officeooo:rsid="0022c51a"/>
    </style:style>
    <style:style style:name="P24" style:family="paragraph" style:parent-style-name="Text_20_body" style:list-style-name="L10">
      <style:text-properties officeooo:rsid="0022c51a"/>
    </style:style>
    <style:style style:name="P25" style:family="paragraph" style:parent-style-name="Standard">
      <style:text-properties style:font-name="Liberation Mono" officeooo:rsid="0022e4b2" officeooo:paragraph-rsid="0022e4b2"/>
    </style:style>
    <style:style style:name="P26" style:family="paragraph" style:parent-style-name="Heading_20_2">
      <style:text-properties style:font-name="Liberation Mono" officeooo:rsid="0022e4b2" officeooo:paragraph-rsid="0022e4b2"/>
    </style:style>
    <style:style style:name="P27" style:family="paragraph" style:parent-style-name="Text_20_body">
      <style:text-properties style:font-name="Liberation Mono" officeooo:rsid="0022e4b2"/>
    </style:style>
    <style:style style:name="P28" style:family="paragraph" style:parent-style-name="Text_20_body" style:list-style-name="L11">
      <style:text-properties officeooo:rsid="0022e4b2"/>
    </style:style>
    <style:style style:name="P29" style:family="paragraph" style:parent-style-name="Text_20_body">
      <style:paragraph-properties fo:margin-left="0in" fo:margin-right="0in" fo:text-indent="0in" style:auto-text-indent="false"/>
      <style:text-properties officeooo:rsid="0022e4b2"/>
    </style:style>
    <style:style style:name="P30" style:family="paragraph" style:parent-style-name="Text_20_body">
      <style:text-properties officeooo:rsid="0022e4b2" officeooo:paragraph-rsid="0022e4b2"/>
    </style:style>
    <style:style style:name="P31" style:family="paragraph" style:parent-style-name="Heading_20_2">
      <style:paragraph-properties fo:margin-left="0in" fo:margin-right="0in" fo:text-indent="0in" style:auto-text-indent="false"/>
      <style:text-properties style:font-name="Liberation Mono" fo:font-size="12pt" officeooo:rsid="0022e4b2" style:font-size-asian="12pt" style:font-size-complex="12pt"/>
    </style:style>
    <style:style style:name="P32" style:family="paragraph" style:parent-style-name="Heading_20_2">
      <style:paragraph-properties fo:margin-left="0in" fo:margin-right="0in" fo:text-indent="0in" style:auto-text-indent="false"/>
      <style:text-properties officeooo:rsid="0022e4b2"/>
    </style:style>
    <style:style style:name="P33" style:family="paragraph" style:parent-style-name="Text_20_body" style:list-style-name="L12">
      <style:text-properties style:font-name="Liberation Mono" officeooo:rsid="0022e4b2"/>
    </style:style>
    <style:style style:name="P34" style:family="paragraph" style:parent-style-name="Text_20_body">
      <style:paragraph-properties fo:margin-left="0in" fo:margin-right="0in" fo:text-indent="0in" style:auto-text-indent="false"/>
      <style:text-properties style:font-name="Liberation Mono" officeooo:rsid="0022e4b2"/>
    </style:style>
    <style:style style:name="P35" style:family="paragraph" style:parent-style-name="Heading_20_2">
      <style:paragraph-properties fo:margin-left="0in" fo:margin-right="0in" fo:text-indent="0in" style:auto-text-indent="false"/>
      <style:text-properties style:font-name="Liberation Mono" officeooo:rsid="0022e4b2"/>
    </style:style>
    <style:style style:name="P36" style:family="paragraph" style:parent-style-name="Text_20_body" style:list-style-name="L13">
      <style:text-properties style:font-name="Liberation Mono" officeooo:rsid="0022e4b2"/>
    </style:style>
    <style:style style:name="P37" style:family="paragraph" style:parent-style-name="Text_20_body" style:list-style-name="L14">
      <style:text-properties style:font-name="Liberation Mono" officeooo:rsid="0022e4b2"/>
    </style:style>
    <style:style style:name="P38" style:family="paragraph" style:parent-style-name="Standard">
      <style:text-properties style:font-name="Liberation Mono" officeooo:rsid="0028ab0c" officeooo:paragraph-rsid="0028ab0c"/>
    </style:style>
    <style:style style:name="P39" style:family="paragraph" style:parent-style-name="Text_20_body" style:list-style-name="L15">
      <style:text-properties officeooo:paragraph-rsid="0028ab0c"/>
    </style:style>
    <style:style style:name="P40" style:family="paragraph" style:parent-style-name="Text_20_body" style:list-style-name="L16">
      <style:text-properties style:font-name="Liberation Mono" officeooo:rsid="0028ab0c"/>
    </style:style>
    <style:style style:name="P41" style:family="paragraph" style:parent-style-name="Text_20_body" style:list-style-name="L17">
      <style:text-properties style:font-name="Liberation Mono" officeooo:rsid="0028ab0c"/>
    </style:style>
    <style:style style:name="P42" style:family="paragraph" style:parent-style-name="Text_20_body" style:list-style-name="L18">
      <style:text-properties style:font-name="Liberation Mono" officeooo:rsid="0028ab0c"/>
    </style:style>
    <style:style style:name="T1" style:family="text">
      <style:text-properties officeooo:rsid="001e7490"/>
    </style:style>
    <style:style style:name="T2" style:family="text">
      <style:text-properties style:font-name="Liberation Mono"/>
    </style:style>
    <style:style style:name="T3" style:family="text">
      <style:text-properties style:font-name="Liberation Mono" officeooo:rsid="0028ab0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/>
      <text:p text:style-name="P2"/>
      <text:p text:style-name="P2"/>
      <text:p text:style-name="P3">Direção do Projeto:</text:p>
      <text:h text:style-name="P1" text:outline-level="2"><text:bookmark text:name="fase-1"/>Fase 1</text:h>
      <text:list text:style-name="L1">
        <text:list-item>
          <text:p text:style-name="P4">Definir escopo do MVP.</text:p>
        </text:list-item>
        <text:list-item>
          <text:p text:style-name="P4">Criar repositório e padrão de pastas.</text:p>
        </text:list-item>
        <text:list-item>
          <text:p text:style-name="P4">Configurar Go, banco, lint, testes e Docker.</text:p>
        </text:list-item>
        <text:list-item>
          <text:p text:style-name="P4">Implementar autenticação e estrutura base.</text:p>
        </text:list-item>
      </text:list>
      <text:h text:style-name="P5" text:outline-level="2"><text:bookmark text:name="fase-2"/>Fase 2</text:h>
      <text:list text:style-name="L2">
        <text:list-item>
          <text:p text:style-name="P6">Cadastro de pacientes.</text:p>
        </text:list-item>
        <text:list-item>
          <text:p text:style-name="P6">Upload de documentos.</text:p>
        </text:list-item>
        <text:list-item>
          <text:p text:style-name="P6">Usuários, perfis e permissões.</text:p>
        </text:list-item>
        <text:list-item>
          <text:p text:style-name="P6">Status do paciente.</text:p>
        </text:list-item>
      </text:list>
      <text:h text:style-name="P5" text:outline-level="2"><text:bookmark text:name="fase-3"/>Fase 3</text:h>
      <text:list text:style-name="L3">
        <text:list-item>
          <text:p text:style-name="P7">Receita e validade.</text:p>
        </text:list-item>
        <text:list-item>
          <text:p text:style-name="P7">Pedidos de medicação.</text:p>
        </text:list-item>
        <text:list-item>
          <text:p text:style-name="P7">Estoque e movimentações.</text:p>
        </text:list-item>
        <text:list-item>
          <text:p text:style-name="P7">Alertas básicos.</text:p>
        </text:list-item>
      </text:list>
      <text:h text:style-name="P5" text:outline-level="2"><text:bookmark text:name="fase-4"/>Fase 4</text:h>
      <text:list text:style-name="L4">
        <text:list-item>
          <text:p text:style-name="P8">Anamnese e rastreio.</text:p>
        </text:list-item>
        <text:list-item>
          <text:p text:style-name="P8">Financeiro/anuidade.</text:p>
        </text:list-item>
        <text:list-item>
          <text:p text:style-name="P8">Relatórios e dashboards.</text:p>
        </text:list-item>
        <text:list-item>
          <text:p text:style-name="P8">Exportação PDF.</text:p>
        </text:list-item>
      </text:list>
      <text:h text:style-name="P5" text:outline-level="2"><text:bookmark text:name="fase-5"/>Fase 5</text:h>
      <text:list text:style-name="L5">
        <text:list-item>
          <text:p text:style-name="P9">Multi-tenant.</text:p>
        </text:list-item>
        <text:list-item>
          <text:p text:style-name="P9">Plano anual.</text:p>
        </text:list-item>
        <text:list-item>
          <text:p text:style-name="P9"><text:soft-page-break/>Auditoria.</text:p>
        </text:list-item>
        <text:list-item>
          <text:p text:style-name="P9">Escalabilidade e observabilidade.</text:p>
        </text:list-item>
      </text:list>
      <text:p text:style-name="P10"/>
      <text:p text:style-name="P10"/>
      <text:p text:style-name="P10"/>
      <text:p text:style-name="P10"/>
      <text:p text:style-name="P10">À<text:span text:style-name="T1">rvore de pastas</text:span></text:p>
      <text:p text:style-name="P10"/>
      <text:p text:style-name="P10"/>
      <text:p text:style-name="P10">cannacare-backend/</text:p>
      <text:p text:style-name="P10">├── cmd/</text:p>
      <text:p text:style-name="P10">│ <text:s text:c="2"/>└── api/</text:p>
      <text:p text:style-name="P10">│ <text:s text:c="6"/>└── main.go</text:p>
      <text:p text:style-name="P10">├── internal/</text:p>
      <text:p text:style-name="P10">│ <text:s text:c="2"/>├── config/</text:p>
      <text:p text:style-name="P10">│ <text:s text:c="2"/>├── domain/</text:p>
      <text:p text:style-name="P10">│ <text:s text:c="2"/>│ <text:s text:c="2"/>├── patient/</text:p>
      <text:p text:style-name="P10">│ <text:s text:c="2"/>│ <text:s text:c="2"/>├── prescription/</text:p>
      <text:p text:style-name="P10">│ <text:s text:c="2"/>│ <text:s text:c="2"/>├── order/</text:p>
      <text:p text:style-name="P10">│ <text:s text:c="2"/>│ <text:s text:c="2"/>├── stock/</text:p>
      <text:p text:style-name="P10">│ <text:s text:c="2"/>│ <text:s text:c="2"/>├── billing/</text:p>
      <text:p text:style-name="P10">│ <text:s text:c="2"/>│ <text:s text:c="2"/>└── user/</text:p>
      <text:p text:style-name="P10">│ <text:s text:c="2"/>├── application/</text:p>
      <text:p text:style-name="P10">│ <text:s text:c="2"/>│ <text:s text:c="2"/>├── usecase/</text:p>
      <text:p text:style-name="P10">│ <text:s text:c="2"/>│ <text:s text:c="2"/>└── dto/</text:p>
      <text:p text:style-name="P10">│ <text:s text:c="2"/>├── infrastructure/</text:p>
      <text:p text:style-name="P10">│ <text:s text:c="2"/>│ <text:s text:c="2"/>├── database/</text:p>
      <text:p text:style-name="P10">│ <text:s text:c="2"/>│ <text:s text:c="2"/>├── repository/</text:p>
      <text:p text:style-name="P10">│ <text:s text:c="2"/>│ <text:s text:c="2"/>├── storage/</text:p>
      <text:p text:style-name="P10">│ <text:s text:c="2"/>│ <text:s text:c="2"/>├── auth/</text:p>
      <text:p text:style-name="P10">│ <text:s text:c="2"/>│ <text:s text:c="2"/>└── queue/</text:p>
      <text:p text:style-name="P10">│ <text:s text:c="2"/>├── interfaces/</text:p>
      <text:p text:style-name="P10">│ <text:s text:c="2"/>│ <text:s text:c="2"/>├── http/</text:p>
      <text:p text:style-name="P10">│ <text:s text:c="2"/>│ <text:s text:c="2"/>│ <text:s text:c="2"/>├── handler/</text:p>
      <text:p text:style-name="P10">│ <text:s text:c="2"/>│ <text:s text:c="2"/>│ <text:s text:c="2"/>├── route/</text:p>
      <text:p text:style-name="P10">│ <text:s text:c="2"/>│ <text:s text:c="2"/>│ <text:s text:c="2"/>└── middleware/</text:p>
      <text:p text:style-name="P10">│ <text:s text:c="2"/>│ <text:s text:c="2"/>└── presenter/</text:p>
      <text:p text:style-name="P10">│ <text:s text:c="2"/>└── shared/</text:p>
      <text:p text:style-name="P10">│ <text:s text:c="6"/>├── errors/</text:p>
      <text:p text:style-name="P10">│ <text:s text:c="6"/>├── logger/</text:p>
      <text:p text:style-name="P10">│ <text:s text:c="6"/>└── utils/</text:p>
      <text:p text:style-name="P10">├── configs/</text:p>
      <text:p text:style-name="P10">├── migrations/</text:p>
      <text:p text:style-name="P10">├── docs/</text:p>
      <text:p text:style-name="P10">├── scripts/</text:p>
      <text:p text:style-name="P10">├── test/</text:p>
      <text:p text:style-name="P10">├── docker-compose.yml</text:p>
      <text:p text:style-name="P10">├── Dockerfile</text:p>
      <text:p text:style-name="P10"><text:soft-page-break/>└── go.mod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1" text:outline-level="2"><text:bookmark text:name="regras-de-organizao"/>Regras de organização</text:h>
      <text:p text:style-name="P12">Para não bagunçar o projeto, siga essas regras:</text:p>
      <text:list text:style-name="L6">
        <text:list-item>
          <text:p text:style-name="P13"><text:span text:style-name="Source_20_Text"><text:span text:style-name="T2">domain</text:span></text:span><text:span text:style-name="T2"> não depende de framework.</text:span></text:p>
        </text:list-item>
        <text:list-item>
          <text:p text:style-name="P13"><text:span text:style-name="Source_20_Text"><text:span text:style-name="T2">application</text:span></text:span><text:span text:style-name="T2"> coordena casos de uso.</text:span></text:p>
        </text:list-item>
        <text:list-item>
          <text:p text:style-name="P13"><text:span text:style-name="Source_20_Text"><text:span text:style-name="T2">infrastructure</text:span></text:span><text:span text:style-name="T2"> cuida de banco, storage e integrações.</text:span></text:p>
        </text:list-item>
        <text:list-item>
          <text:p text:style-name="P13"><text:span text:style-name="Source_20_Text"><text:span text:style-name="T2">interfaces</text:span></text:span><text:span text:style-name="T2"> expõe HTTP, GraphQL ou qualquer entrada.</text:span></text:p>
        </text:list-item>
        <text:list-item>
          <text:p text:style-name="P13"><text:span text:style-name="Source_20_Text"><text:span text:style-name="T2">shared</text:span></text:span><text:span text:style-name="T2"> só para utilitários realmente genéricos.</text:span></text:p>
        </text:list-item>
      </text:list>
      <text:p text:style-name="P12">Isso ajuda você a manter o núcleo do sistema estável mesmo quando trocar banco, framework ou serviço externo.</text:p>
      <text:h text:style-name="P14" text:outline-level="2"><text:bookmark text:name="stack-inicial"/>Stack inicial</text:h>
      <text:p text:style-name="P12">Para o seu caso, eu manteria esta base:</text:p>
      <text:list text:style-name="L7">
        <text:list-item>
          <text:p text:style-name="P15">Backend: Go.</text:p>
        </text:list-item>
        <text:list-item>
          <text:p text:style-name="P15">HTTP framework: Gin.</text:p>
        </text:list-item>
        <text:list-item>
          <text:p text:style-name="P15">Banco: PostgreSQL.</text:p>
        </text:list-item>
        <text:list-item>
          <text:p text:style-name="P15">Cache/filas: Redis.</text:p>
        </text:list-item>
        <text:list-item>
          <text:p text:style-name="P15">Storage de arquivos: MinIO.</text:p>
        </text:list-item>
        <text:list-item>
          <text:p text:style-name="P15">Frontend futuro: Next.js com TypeScript.</text:p>
        </text:list-item>
        <text:list-item>
          <text:p text:style-name="P16"><text:span text:style-name="T2">Testes: </text:span><text:span text:style-name="Source_20_Text"><text:span text:style-name="T2">testing</text:span></text:span><text:span text:style-name="T2"> do Go + test suite por camada.</text:span></text:p>
        </text:list-item>
        <text:list-item>
          <text:p text:style-name="P15">Documentação: Swagger/OpenAPI.</text:p>
        </text:list-item>
      </text:list>
      <text:p text:style-name="P17">Essa stack é muito boa para um SaaS porque permite começar pequeno e crescer com segurança.github+1</text:p>
      <text:h text:style-name="P14" text:outline-level="2"><text:bookmark text:name="como-pensar-solid"/>Como pensar SOLID</text:h>
      <text:p text:style-name="P12">No seu projeto, SOLID vai te ajudar assim:</text:p>
      <text:list text:style-name="L8">
        <text:list-item>
          <text:p text:style-name="P18"><text:soft-page-break/><text:span text:style-name="Strong_20_Emphasis"><text:span text:style-name="T2">S</text:span></text:span><text:span text:style-name="T2">: cada struct/service com uma única responsabilidade.</text:span></text:p>
        </text:list-item>
        <text:list-item>
          <text:p text:style-name="P18"><text:span text:style-name="Strong_20_Emphasis"><text:span text:style-name="T2">O</text:span></text:span><text:span text:style-name="T2">: regras extensíveis sem reescrever o sistema todo.</text:span></text:p>
        </text:list-item>
        <text:list-item>
          <text:p text:style-name="P18"><text:span text:style-name="Strong_20_Emphasis"><text:span text:style-name="T2">L</text:span></text:span><text:span text:style-name="T2">: interfaces substituíveis sem quebrar comportamento.</text:span></text:p>
        </text:list-item>
        <text:list-item>
          <text:p text:style-name="P18"><text:span text:style-name="Strong_20_Emphasis"><text:span text:style-name="T2">I</text:span></text:span><text:span text:style-name="T2">: interfaces pequenas e específicas.</text:span></text:p>
        </text:list-item>
        <text:list-item>
          <text:p text:style-name="P18"><text:span text:style-name="Strong_20_Emphasis"><text:span text:style-name="T2">D</text:span></text:span><text:span text:style-name="T2">: dependências apontam para abstrações, não para detalhes.</text:span></text:p>
        </text:list-item>
      </text:list>
      <text:p text:style-name="P12">Na prática, isso significa: handler não fala com SQL direto, service não sabe de HTTP, e repositório não decide regra de negócio.</text:p>
      <text:h text:style-name="P14" text:outline-level="2"><text:bookmark text:name="prximo-passo-tcnico"/>Próximo passo técnico</text:h>
      <text:p text:style-name="P12">O melhor começo agora é montar:</text:p>
      <text:list text:style-name="L9">
        <text:list-item>
          <text:p text:style-name="P19">nome do repositório,</text:p>
        </text:list-item>
        <text:list-item>
          <text:p text:style-name="P19">árvore inicial de pastas,</text:p>
        </text:list-item>
        <text:list-item>
          <text:p text:style-name="P20"><text:span text:style-name="T2">arquivo </text:span><text:span text:style-name="Source_20_Text"><text:span text:style-name="T2">main.go</text:span></text:span><text:span text:style-name="T2">,</text:span></text:p>
        </text:list-item>
        <text:list-item>
          <text:p text:style-name="P19">config do ambiente,</text:p>
        </text:list-item>
        <text:list-item>
          <text:p text:style-name="P19">conexão com PostgreSQL,</text:p>
        </text:list-item>
        <text:list-item>
          <text:p text:style-name="P19">primeiro módulo: autenticação ou pacientes.</text:p>
        </text:list-item>
      </text:list>
      <text:p text:style-name="P10"/>
      <text:p text:style-name="P21">- Rodar o create_projetc.sh para criar estruturas de pastas</text:p>
      <text:p text:style-name="P21"/>
      <text:p text:style-name="P21">------------------------------------------------</text:p>
      <text:p text:style-name="P21"/>
      <text:h text:style-name="P22" text:outline-level="2"><text:bookmark text:name="mdulos-principais"/>Módulos principais</text:h>
      <text:p text:style-name="P23">Para o seu sistema, eu separaria assim:</text:p>
      <text:list text:style-name="L10">
        <text:list-item>
          <text:p text:style-name="P24"><text:span text:style-name="Strong_20_Emphasis"><text:span text:style-name="T2">Auth</text:span></text:span><text:span text:style-name="T2">: login, sessão, refresh token, recuperação de senha.</text:span></text:p>
        </text:list-item>
        <text:list-item>
          <text:p text:style-name="P24"><text:span text:style-name="Strong_20_Emphasis"><text:span text:style-name="T2">Tenancy</text:span></text:span><text:span text:style-name="T2">: associação, plano, limites e configuração por cliente.</text:span></text:p>
        </text:list-item>
        <text:list-item>
          <text:p text:style-name="P24"><text:span text:style-name="Strong_20_Emphasis"><text:span text:style-name="T2">Users</text:span></text:span><text:span text:style-name="T2">: usuários internos e permissões.</text:span></text:p>
        </text:list-item>
        <text:list-item>
          <text:p text:style-name="P24"><text:span text:style-name="Strong_20_Emphasis"><text:span text:style-name="T2">Patients</text:span></text:span><text:span text:style-name="T2">: cadastro, dados pessoais e status.</text:span></text:p>
        </text:list-item>
        <text:list-item>
          <text:p text:style-name="P24"><text:span text:style-name="Strong_20_Emphasis"><text:span text:style-name="T2">Documents</text:span></text:span><text:span text:style-name="T2">: upload, validação e histórico de arquivos.</text:span></text:p>
        </text:list-item>
        <text:list-item>
          <text:p text:style-name="P24"><text:span text:style-name="Strong_20_Emphasis"><text:span text:style-name="T2">Prescriptions</text:span></text:span><text:span text:style-name="T2">: receita, validade, prescrição e alertas.</text:span></text:p>
        </text:list-item>
        <text:list-item>
          <text:p text:style-name="P24"><text:span text:style-name="Strong_20_Emphasis"><text:span text:style-name="T2">Orders</text:span></text:span><text:span text:style-name="T2">: pedidos de medicação, separação, envio e rastreio.</text:span></text:p>
        </text:list-item>
        <text:list-item>
          <text:p text:style-name="P24"><text:span text:style-name="Strong_20_Emphasis"><text:span text:style-name="T2">Stock</text:span></text:span><text:span text:style-name="T2">: produtos, lotes, entrada, saída e alertas.</text:span></text:p>
        </text:list-item>
        <text:list-item>
          <text:p text:style-name="P24"><text:span text:style-name="Strong_20_Emphasis"><text:span text:style-name="T2">Billing</text:span></text:span><text:span text:style-name="T2">: anuidade, pagamentos, recibos e inadimplência.</text:span></text:p>
        </text:list-item>
        <text:list-item>
          <text:p text:style-name="P24"><text:soft-page-break/><text:span text:style-name="Strong_20_Emphasis"><text:span text:style-name="T2">Care</text:span></text:span><text:span text:style-name="T2">: anamnese, rastreio de 1 mês e acompanhamento.</text:span></text:p>
        </text:list-item>
        <text:list-item>
          <text:p text:style-name="P24"><text:span text:style-name="Strong_20_Emphasis"><text:span text:style-name="T2">Reports</text:span></text:span><text:span text:style-name="T2">: indicadores, relatórios e exportações.</text:span></text:p>
        </text:list-item>
        <text:list-item>
          <text:p text:style-name="P24"><text:span text:style-name="Strong_20_Emphasis"><text:span text:style-name="T2">Audit</text:span></text:span><text:span text:style-name="T2">: trilha de auditoria e logs de ações.</text:span></text:p>
        </text:list-item>
        <text:list-item>
          <text:p text:style-name="P24"><text:span text:style-name="Strong_20_Emphasis"><text:span text:style-name="T2">Notifications</text:span></text:span><text:span text:style-name="T2">: e-mail, WhatsApp e alertas internos.</text:span></text:p>
        </text:list-item>
      </text:list>
      <text:p text:style-name="P23">Essa divisão reflete bem os fluxos que você já mapeou e ajuda a manter cada parte com responsabilidade clara.</text:p>
      <text:p text:style-name="P21"/>
      <text:p text:style-name="P21"/>
      <text:p text:style-name="P25">Observação!!</text:p>
      <text:p text:style-name="P25"/>
      <text:h text:style-name="P26" text:outline-level="2"><text:bookmark text:name="como-conectar-os-mdulos"/>Como conectar os módulos</text:h>
      <text:p text:style-name="P27">Pense assim:</text:p>
      <text:list text:style-name="L11">
        <text:list-item>
          <text:p text:style-name="P28"><text:span text:style-name="Source_20_Text"><text:span text:style-name="T2">Patients</text:span></text:span><text:span text:style-name="T2"> depende de </text:span><text:span text:style-name="Source_20_Text"><text:span text:style-name="T2">Users</text:span></text:span><text:span text:style-name="T2"> e </text:span><text:span text:style-name="Source_20_Text"><text:span text:style-name="T2">Tenancy</text:span></text:span><text:span text:style-name="T2"> para saber quem criou e em qual associação está.</text:span></text:p>
        </text:list-item>
        <text:list-item>
          <text:p text:style-name="P28"><text:span text:style-name="Source_20_Text"><text:span text:style-name="T2">Documents</text:span></text:span><text:span text:style-name="T2"> se conecta a </text:span><text:span text:style-name="Source_20_Text"><text:span text:style-name="T2">Patients</text:span></text:span><text:span text:style-name="T2">.</text:span></text:p>
        </text:list-item>
        <text:list-item>
          <text:p text:style-name="P28"><text:span text:style-name="Source_20_Text"><text:span text:style-name="T2">Prescriptions</text:span></text:span><text:span text:style-name="T2"> se conecta a </text:span><text:span text:style-name="Source_20_Text"><text:span text:style-name="T2">Patients</text:span></text:span><text:span text:style-name="T2"> e valida regras antes de liberar pedido.</text:span></text:p>
        </text:list-item>
        <text:list-item>
          <text:p text:style-name="P28"><text:span text:style-name="Source_20_Text"><text:span text:style-name="T2">Orders</text:span></text:span><text:span text:style-name="T2"> se conecta a </text:span><text:span text:style-name="Source_20_Text"><text:span text:style-name="T2">Prescriptions</text:span></text:span><text:span text:style-name="T2"> e </text:span><text:span text:style-name="Source_20_Text"><text:span text:style-name="T2">Stock</text:span></text:span><text:span text:style-name="T2">.</text:span></text:p>
        </text:list-item>
        <text:list-item>
          <text:p text:style-name="P28"><text:span text:style-name="Source_20_Text"><text:span text:style-name="T2">Billing</text:span></text:span><text:span text:style-name="T2"> se conecta a </text:span><text:span text:style-name="Source_20_Text"><text:span text:style-name="T2">Patients</text:span></text:span><text:span text:style-name="T2"> e ao ciclo de acesso.</text:span></text:p>
        </text:list-item>
        <text:list-item>
          <text:p text:style-name="P28"><text:span text:style-name="Source_20_Text"><text:span text:style-name="T2">Care</text:span></text:span><text:span text:style-name="T2"> se conecta a </text:span><text:span text:style-name="Source_20_Text"><text:span text:style-name="T2">Patients</text:span></text:span><text:span text:style-name="T2"> e </text:span><text:span text:style-name="Source_20_Text"><text:span text:style-name="T2">Users</text:span></text:span><text:span text:style-name="T2">.</text:span></text:p>
        </text:list-item>
        <text:list-item>
          <text:p text:style-name="P28"><text:span text:style-name="Source_20_Text"><text:span text:style-name="T2">Reports</text:span></text:span><text:span text:style-name="T2"> lê dados de vários módulos, mas não manda em regra de negócio.</text:span></text:p>
        </text:list-item>
      </text:list>
      <text:p text:style-name="P29"><text:span text:style-name="T2">A regra prática é: </text:span><text:span text:style-name="Strong_20_Emphasis"><text:span text:style-name="T2">um módulo pode consultar outro, mas não deve bagunçar a lógica interna dele</text:span></text:span><text:span text:style-name="T2">.kamilgrzybek+1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0"><text:soft-page-break/><text:span text:style-name="T2">Essa estrutura segue o padrão recomendado de usar </text:span><text:span text:style-name="Source_20_Text"><text:span text:style-name="T2">cmd/</text:span></text:span><text:span text:style-name="T2"> para ponto de entrada e </text:span><text:span text:style-name="Source_20_Text"><text:span text:style-name="T2">internal/</text:span></text:span><text:span text:style-name="T2"> para lógica privada do projeto. Organizar por domínio dentro de </text:span><text:span text:style-name="Source_20_Text"><text:span text:style-name="T2">internal/</text:span></text:span><text:span text:style-name="T2"> também é uma prática forte para sistemas que têm vários módulos de negócio, como pacientes, pedidos, estoque e financeiro.bytelearn+1</text:span></text:p>
      <text:h text:style-name="P31" text:outline-level="2"><text:bookmark text:name="responsabilidade-de-cada-pasta"/>Responsabilidade de cada pasta:</text:h>
      <text:h text:style-name="P32" text:outline-level="2"><text:bookmark text:name="cmdapi"/><text:span text:style-name="Source_20_Text"><text:span text:style-name="T2">cmd/api</text:span></text:span></text:h>
      <text:p text:style-name="P29"><text:span text:style-name="T2">Ponto de entrada da aplicação. O </text:span><text:span text:style-name="Source_20_Text"><text:span text:style-name="T2">main.go</text:span></text:span><text:span text:style-name="T2"> deve ficar pequeno e só fazer bootstrap: carregar config, conectar banco, subir servidor e registrar rotas.daveamit+1</text:span></text:p>
      <text:h text:style-name="P32" text:outline-level="2"><text:bookmark text:name="internaldomain"/><text:span text:style-name="Source_20_Text"><text:span text:style-name="T2">internal/domain</text:span></text:span></text:h>
      <text:p text:style-name="P27">Aqui fica o núcleo do sistema. Cada módulo terá entidade, regras, contratos de repositório e validações do negócio.</text:p>
      <text:h text:style-name="P32" text:outline-level="2"><text:bookmark text:name="internalapplication"/><text:span text:style-name="Source_20_Text"><text:span text:style-name="T2">internal/application</text:span></text:span></text:h>
      <text:p text:style-name="P27">Camada de casos de uso. Ela orquestra o domínio e conversa com DTOs, sem depender de HTTP ou banco diretamente.</text:p>
      <text:h text:style-name="P32" text:outline-level="2"><text:bookmark text:name="internalinfrastructure"/><text:span text:style-name="Source_20_Text"><text:span text:style-name="T2">internal/infrastructure</text:span></text:span></text:h>
      <text:p text:style-name="P27">Tudo que é detalhe técnico entra aqui: PostgreSQL, Redis, S3/MinIO, JWT, geração de PDF e integrações externas.</text:p>
      <text:h text:style-name="P32" text:outline-level="2"><text:bookmark text:name="internalinterfaceshttp"/><text:span text:style-name="Source_20_Text"><text:span text:style-name="T2">internal/interfaces/http</text:span></text:span></text:h>
      <text:p text:style-name="P27">Camada de entrada via API REST. Handlers recebem requests, validam input e chamam use cases.</text:p>
      <text:h text:style-name="P32" text:outline-level="2"><text:bookmark text:name="internalshared"/><text:span text:style-name="Source_20_Text"><text:span text:style-name="T2">internal/shared</text:span></text:span></text:h>
      <text:p text:style-name="P27">Funções e estruturas reutilizáveis, como erros padronizados, logger e helpers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h text:style-name="P26" text:outline-level="2"><text:bookmark text:name="ordem-de-criao"/>Ordem de criação</text:h>
      <text:p text:style-name="P27">Como você vai fazer sozinho, eu sugiro esta sequência:</text:p>
      <text:list text:style-name="L12">
        <text:list-item>
          <text:p text:style-name="P33">Criar repositório e estrutura de pastas.</text:p>
        </text:list-item>
        <text:list-item>
          <text:p text:style-name="P33">Configurar Go, Docker, PostgreSQL e <text:span text:style-name="Source_20_Text">.env</text:span>.</text:p>
        </text:list-item>
        <text:list-item>
          <text:p text:style-name="P33">Fazer o <text:span text:style-name="Source_20_Text">main.go</text:span> subir a API.</text:p>
        </text:list-item>
        <text:list-item>
          <text:p text:style-name="P33">Criar módulo de autenticação.</text:p>
        </text:list-item>
        <text:list-item>
          <text:p text:style-name="P33">Criar módulo de pacientes.</text:p>
        </text:list-item>
        <text:list-item>
          <text:p text:style-name="P33">Depois prescrição, pedidos, estoque e financeiro.</text:p>
        </text:list-item>
      </text:list>
      <text:p text:style-name="P34">Isso evita começar pelo que é mais difícil antes de ter a base funcionando.daveamit+1</text:p>
      <text:h text:style-name="P35" text:outline-level="2"><text:bookmark text:name="primeiros-arquivos-importantes"/>Primeiros arquivos importantes</text:h>
      <text:p text:style-name="P27">Você pode começar com estes arquivos:</text:p>
      <text:list text:style-name="L13">
        <text:list-item>
          <text:p text:style-name="P36"><text:span text:style-name="Source_20_Text">cmd/api/main.go</text:span></text:p>
        </text:list-item>
        <text:list-item>
          <text:p text:style-name="P36"><text:span text:style-name="Source_20_Text">internal/config/config.go</text:span></text:p>
        </text:list-item>
        <text:list-item>
          <text:p text:style-name="P36"><text:span text:style-name="Source_20_Text">internal/interfaces/http/router.go</text:span></text:p>
        </text:list-item>
        <text:list-item>
          <text:p text:style-name="P36"><text:span text:style-name="Source_20_Text">internal/interfaces/http/middleware/auth.go</text:span></text:p>
        </text:list-item>
        <text:list-item>
          <text:p text:style-name="P36"><text:span text:style-name="Source_20_Text">internal/domain/patient/entity.go</text:span></text:p>
        </text:list-item>
        <text:list-item>
          <text:p text:style-name="P36"><text:span text:style-name="Source_20_Text">internal/domain/patient/repository.go</text:span></text:p>
        </text:list-item>
        <text:list-item>
          <text:p text:style-name="P36"><text:span text:style-name="Source_20_Text">internal/application/usecase/create_patient.go</text:span></text:p>
        </text:list-item>
        <text:list-item>
          <text:p text:style-name="P36"><text:span text:style-name="Source_20_Text">internal/infrastructure/repository/patient_repository_postgres.go</text:span></text:p>
        </text:list-item>
        <text:list-item>
          <text:p text:style-name="P36"><text:span text:style-name="Source_20_Text">migrations/0001_create_patients.sql</text:span></text:p>
        </text:list-item>
        <text:list-item>
          <text:p text:style-name="P36"><text:span text:style-name="Source_20_Text">Dockerfile</text:span></text:p>
        </text:list-item>
        <text:list-item>
          <text:p text:style-name="P36"><text:span text:style-name="Source_20_Text">docker-compose.yml</text:span></text:p>
        </text:list-item>
        <text:list-item>
          <text:p text:style-name="P36"><text:span text:style-name="Source_20_Text">.env.example</text:span></text:p>
        </text:list-item>
      </text:list>
      <text:p text:style-name="P27">Essa base já te permite codar de forma organizada desde o primeiro commit.</text:p>
      <text:p text:style-name="P25"/>
      <text:p text:style-name="P25"/>
      <text:p text:style-name="P25"/>
      <text:p text:style-name="P25"><text:soft-page-break/></text:p>
      <text:h text:style-name="P26" text:outline-level="2"><text:bookmark text:name="regras-de-manuteno"/>Regras de manutenção</text:h>
      <text:p text:style-name="P27">Para manter o projeto limpo:</text:p>
      <text:list text:style-name="L14">
        <text:list-item>
          <text:p text:style-name="P37">um pacote por responsabilidade;</text:p>
        </text:list-item>
        <text:list-item>
          <text:p text:style-name="P37">main pequeno;</text:p>
        </text:list-item>
        <text:list-item>
          <text:p text:style-name="P37">dependências apontando para abstrações;</text:p>
        </text:list-item>
        <text:list-item>
          <text:p text:style-name="P37">domínio sem dependência de framework;</text:p>
        </text:list-item>
        <text:list-item>
          <text:p text:style-name="P37">testes próximos do código;</text:p>
        </text:list-item>
        <text:list-item>
          <text:p text:style-name="P37">nomes consistentes e curtos.</text:p>
        </text:list-item>
      </text:list>
      <text:p text:style-name="P27">Essas práticas estão alinhadas com layouts Go consolidados e com o uso de <text:span text:style-name="Source_20_Text">internal/</text:span> para proteger o core do sistema.</text:p>
      <text:p text:style-name="P25"/>
      <text:p text:style-name="P25"/>
      <text:p text:style-name="P25"/>
      <text:p text:style-name="P38">Organograma de semanas de desenvolvimento:</text:p>
      <text:p text:style-name="P38"/>
      <text:list text:style-name="L15">
        <text:list-item>
          <text:p text:style-name="P39"><text:span text:style-name="T3">Semana 1: arquitetura, banco, autenticação e base do projeto.</text:span></text:p>
        </text:list-item>
      </text:list>
      <text:list text:style-name="L16">
        <text:list-item>
          <text:p text:style-name="P40">Semana 2: pacientes, documentos e status.</text:p>
        </text:list-item>
      </text:list>
      <text:list text:style-name="L17">
        <text:list-item>
          <text:p text:style-name="P41">Semana 3: receitas, pedidos e estoque.</text:p>
        </text:list-item>
      </text:list>
      <text:list text:style-name="L18">
        <text:list-item>
          <text:p text:style-name="P42">Semana 4: financeiro, relatórios e refinamento.</text:p>
        </text:list-item>
      </text:list>
      <text:p text:style-name="P38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7T08:50:19.939939992</meta:creation-date>
    <dc:date>2026-06-29T23:29:38.260434354</dc:date>
    <meta:editing-duration>PT58M14S</meta:editing-duration>
    <meta:editing-cycles>7</meta:editing-cycles>
    <meta:generator>LibreOffice/26.2.4.2$Linux_X86_64 LibreOffice_project/620$Build-2</meta:generator>
    <meta:document-statistic meta:table-count="0" meta:image-count="0" meta:object-count="0" meta:page-count="8" meta:paragraph-count="183" meta:word-count="1061" meta:character-count="6762" meta:non-whitespace-character-count="5860"/>
  </office:meta>
</office:document-meta>
</file>