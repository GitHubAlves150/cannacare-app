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Mono" fo:font-size="15pt" fo:font-style="normal" fo:font-weight="normal" officeooo:rsid="00246d5b" officeooo:paragraph-rsid="000dc987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Heading_20_2">
      <style:text-properties style:font-name="Liberation Mono" fo:font-size="15pt" fo:font-style="normal" fo:font-weight="normal" officeooo:rsid="00246d5b" officeooo:paragraph-rsid="000dc987" style:font-size-asian="15pt" style:font-style-asian="normal" style:font-weight-asian="normal" style:font-size-complex="15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tar um documento vivo com estes blocos para apresentação.</text:p>
      <text:h text:style-name="P2" text:outline-level="2">Visão de produto:</text:h>
      <text:p text:style-name="P1">Problema que resolve:</text:p>
      <text:p text:style-name="P1">público alvo:</text:p>
      <text:p text:style-name="P1">Funcionalidades principais.</text:p>
      <text:p text:style-name="P1">Arquitetura técnica.</text:p>
      <text:p text:style-name="P1">Segurança a conformidade.</text:p>
      <text:p text:style-name="P1">Escalabilidade.</text:p>
      <text:p text:style-name="P1">Roadmap.</text:p>
      <text:p text:style-name="P1">Evidências técnicas, como protótipos, prints, diagramas e repositóri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9T23:12:35.124569851</meta:creation-date>
    <dc:date>2026-06-29T23:13:15.443306595</dc:date>
    <meta:editing-duration>PT41S</meta:editing-duration>
    <meta:editing-cycles>1</meta:editing-cycles>
    <meta:generator>LibreOffice/26.2.4.2$Linux_X86_64 LibreOffice_project/620$Build-2</meta:generator>
    <meta:document-statistic meta:table-count="0" meta:image-count="0" meta:object-count="0" meta:page-count="1" meta:paragraph-count="10" meta:word-count="34" meta:character-count="277" meta:non-whitespace-character-count="253"/>
  </office:meta>
</office:document-meta>
</file>